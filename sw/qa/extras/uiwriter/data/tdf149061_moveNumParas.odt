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Optima" svg:font-family="Optima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bc65" officeooo:paragraph-rsid="0006bc65"/>
    </style:style>
    <style:style style:name="P2" style:family="paragraph" style:parent-style-name="Standard" style:list-style-name="L1">
      <style:text-properties officeooo:rsid="000a5c36" officeooo:paragraph-rsid="000a5c36"/>
    </style:style>
    <style:style style:name="P3" style:family="paragraph" style:parent-style-name="Standard" style:list-style-name="L1">
      <style:text-properties officeooo:paragraph-rsid="000748c5"/>
    </style:style>
    <style:style style:name="P4" style:family="paragraph" style:parent-style-name="Standard" style:list-style-name="L1">
      <style:text-properties officeooo:rsid="0006bc65" officeooo:paragraph-rsid="000748c5"/>
    </style:style>
    <style:style style:name="T1" style:family="text">
      <style:text-properties officeooo:rsid="000748c5"/>
    </style:style>
    <style:style style:name="Sect1" style:family="section">
      <style:section-properties fo:background-color="#ffdbb6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First Point.</text:p>
        </text:list-item>
        <text:list-item>
          <text:p text:style-name="P1">Second Point.</text:p>
          <text:list>
            <text:list-item>
              <text:p text:style-name="P1">Subpoint to second point.</text:p>
            </text:list-item>
          </text:list>
        </text:list-item>
      </text:list>
      <text:section text:style-name="Sect1" text:name="Section1">
        <text:list text:continue-numbering="true" text:style-name="L1">
          <text:list-item>
            <text:p text:style-name="P2">Section</text:p>
          </text:list-item>
          <text:list-item>
            <text:p text:style-name="P2">boundary</text:p>
          </text:list-item>
        </text:list>
      </text:section>
      <text:list text:continue-numbering="true" text:style-name="L1">
        <text:list-item>
          <text:p text:style-name="P3"><text:span text:style-name="T1">A Point</text:span></text:p>
        </text:list-item>
        <text:list-item>
          <text:p text:style-name="P4"><text:span text:style-name="T1">B</text:span> Point.</text:p>
          <text:list>
            <text:list-item>
              <text:p text:style-name="P4">Subpoint to <text:span text:style-name="T1">B</text:span> point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Optima" svg:font-family="Optima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Optima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Optima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 loext:hyphenation-compound-remain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8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Optima" fo:font-family="Optima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tima" fo:font-family="Optima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tima" fo:font-family="Optima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tima" fo:font-family="Optima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5-13T13:59:52.207872716</meta:creation-date>
    <dc:date>2026-07-16T07:50:52.160100221</dc:date>
    <meta:editing-duration>PT10M14S</meta:editing-duration>
    <meta:editing-cycles>6</meta:editing-cycles>
    <meta:generator>LibreOffice/26.2.4.2$Linux_X86_64 LibreOffice_project/620$Build-2</meta:generator>
    <meta:document-statistic meta:table-count="0" meta:image-count="0" meta:object-count="0" meta:page-count="1" meta:paragraph-count="8" meta:word-count="26" meta:character-count="116" meta:non-whitespace-character-count="106"/>
  </office:meta>
</office:document-meta>
</file>